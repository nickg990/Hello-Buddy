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body>
    <office:text text:use-soft-page-breaks="true">
      <text:p text:style-name="P1">Hindlimb Mobility and Strength Rehabilitation</text:p>
      <text:p text:style-name="P2">Clinical summary</text:p>
      <text:p text:style-name="Normal">Buddy has been referred for a structured physiotherapy programme to support improved hindlimb mobility, strength, balance and confidence during everyday movement. Initial focus is on controlled, low-impact exercises that encourage safe weight shifting, improved range of movement and gradual strengthening without overloading the affected areas.</text:p>
      <text:p text:style-name="Normal">The treatment plan includes short, repeatable home exercises supported by clear owner instructions and video links. Progress should be reviewed through practitioner notes, owner feedback and observed tolerance to exercise. Programme adjustments should be made where Buddy shows signs of fatigue, discomfort, reduced willingness to perform an exercise, or improved capability that allows safe progression.</text:p>
      <text:p text:style-name="Normal">The current rehabilitation aim is to improve functional comfort and movement quality during normal daily activities such as standing, walking, turning, stepping and controlled lead exercise.</text:p>
      <text:p text:style-name="P3">Initial review note</text:p>
      <text:p text:style-name="Normal">Buddy was reviewed for reduced hindlimb strength, stiffness during movement and reduced confidence with controlled stepping and turning. On observation, Buddy appears able to complete short periods of low-impact activity but should avoid rapid movements, jumping, sharp turns or prolonged exercise at this stage.</text:p>
      <text:p text:style-name="Normal">The initial programme should focus on gentle mobility, controlled weight shifting, slow lead walking and simple strengthening exercises that can be completed safely at home. Exercises should be short, calm and repeatable, with owner monitoring for fatigue, discomfort, reluctance or changes in gait.</text:p>
      <text:p text:style-name="Normal">Start with a conservative programme and review tolerance before progressing duration, repetitions or difficulty.</text:p>
      <text:p text:style-name="Normal"><text:span text:style-name="T4">First session purpose</text:span></text:p>
      <text:p text:style-name="Normal">The purpose of the first session is to introduce Buddy to a gentle, controlled rehabilitation programme focused on comfort, confidence and safe movement. The session should assess Buddy’s tolerance to low-impact exercise while beginning to support hindlimb mobility, controlled weight shifting and early strengthening.</text:p>
      <text:p text:style-name="Normal">Exercises should be kept short and calm, with close monitoring for signs of fatigue, discomfort, reluctance or changes in movement quality. The aim is not to challenge Buddy heavily at this stage, but to establish a safe baseline that can be reviewed and progressed in later sessions.</text:p>
      <text:p text:style-name="Normal">https://youtu.be/10zjd6gt0D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ck Gilbert</meta:initial-creator>
    <dc:creator>Nick Gilbert</dc:creator>
    <meta:creation-date>2026-06-18T08:04:00Z</meta:creation-date>
    <dc:date>2026-06-18T10:44:00Z</dc:date>
    <meta:template xlink:href="Normal.dotm" xlink:type="simple"/>
    <meta:editing-cycles>2</meta:editing-cycles>
    <meta:editing-duration>PT6540S</meta:editing-duration>
    <meta:document-statistic meta:page-count="1" meta:paragraph-count="4" meta:word-count="359" meta:character-count="2402" meta:row-count="17" meta:non-whitespace-character-count="2047"/>
  </office:meta>
</office:document-meta>
</file>